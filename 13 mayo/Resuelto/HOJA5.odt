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 style:master-page-name="Standard">
      <style:table-properties style:width="18.568cm" fo:margin-left="-0.007cm" fo:margin-top="0cm" fo:margin-bottom="0cm" style:page-number="auto" table:align="left" style:writing-mode="lr-tb"/>
    </style:style>
    <style:style style:name="Tabla1.A" style:family="table-column">
      <style:table-column-properties style:column-width="14.67cm"/>
    </style:style>
    <style:style style:name="Tabla1.B" style:family="table-column">
      <style:table-column-properties style:column-width="3.89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ffffff" fo:padding-left="0.018cm" fo:padding-right="0.018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fo:font-size="15pt" style:font-size-asian="15pt" style:font-size-complex="15pt"/>
    </style:style>
    <style:style style:name="P4" style:family="paragraph" style:parent-style-name="Standard">
      <style:paragraph-properties fo:margin-left="0cm" fo:margin-right="0cm" fo:margin-top="0cm" fo:margin-bottom="0.212cm" fo:text-align="start" style:justify-single-word="false" fo:text-indent="0cm" style:auto-text-indent="false"/>
      <style:text-properties fo:font-variant="normal" fo:text-transform="none" fo:color="#1d2125" style:font-name="Arial" fo:font-size="15pt" fo:letter-spacing="normal" fo:font-style="normal" fo:font-weight="normal" style:font-size-asian="15pt" style:font-size-complex="15pt"/>
    </style:style>
    <style:style style:name="P5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fo:font-variant="normal" fo:text-transform="none" fo:color="#1d2125" style:font-name="Arial" fo:font-size="15pt" fo:letter-spacing="normal" fo:font-style="normal" fo:font-weight="normal" style:font-size-asian="15pt" style:font-size-complex="15pt"/>
    </style:style>
    <style:style style:name="P6" style:family="paragraph" style:parent-style-name="Horizontal_20_Line">
      <style:text-properties style:font-name="Arial" fo:font-size="15pt" style:font-size-asian="15pt" style:font-size-complex="15pt"/>
    </style:style>
    <style:style style:name="P7" style:family="paragraph" style:parent-style-name="Horizontal_20_Line">
      <style:text-properties fo:font-variant="normal" fo:text-transform="none" fo:color="#1d2125" style:font-name="Arial" fo:font-size="15pt" fo:letter-spacing="normal" fo:font-style="normal" fo:font-weight="normal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fo:font-variant="normal" fo:text-transform="none" fo:color="#1d2125" style:font-name="Arial" fo:font-size="15pt" fo:letter-spacing="normal" fo:font-style="normal" fo:font-weight="normal" style:font-size-asian="15pt" style:font-size-complex="15pt"/>
    </style:style>
    <style:style style:name="P9" style:family="paragraph" style:parent-style-name="Text_20_body">
      <style:paragraph-properties fo:margin-left="0cm" fo:margin-right="0cm" fo:margin-top="0cm" fo:margin-bottom="0.212cm" fo:text-align="justify" style:justify-single-word="false" fo:text-indent="0cm" style:auto-text-indent="false"/>
      <style:text-properties fo:font-variant="normal" fo:text-transform="none" fo:color="#1d2125" style:font-name="Arial" fo:font-size="15pt" fo:letter-spacing="normal" fo:font-style="normal" fo:font-weight="normal" style:font-size-asian="15pt" style:font-size-complex="15pt"/>
    </style:style>
    <style:style style:name="P10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style:font-name="Arial" fo:font-size="15pt" style:font-size-asian="15pt" style:font-size-complex="15pt"/>
    </style:style>
    <style:style style:name="P11" style:family="paragraph" style:parent-style-name="Text_20_body">
      <style:text-properties fo:font-variant="normal" fo:text-transform="none" fo:color="#1d2125" style:font-name="Arial" fo:font-size="15pt" fo:letter-spacing="normal" fo:font-style="normal" fo:font-weight="normal" style:font-size-asian="15pt" style:font-size-complex="15pt"/>
    </style:style>
    <style:style style:name="P12" style:family="paragraph" style:parent-style-name="Text_20_body">
      <style:text-properties style:font-name="Arial" fo:font-size="15pt" style:font-size-asian="15pt" style:font-size-complex="15pt"/>
    </style:style>
    <style:style style:name="T1" style:family="text">
      <style:text-properties fo:font-variant="normal" fo:text-transform="none" fo:color="#1d2125" fo:letter-spacing="normal" fo:font-style="normal" fo:font-weight="normal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STITUTO DE E.S. “PABLO RUIZ PICASSO”. Chiclana.</text:p>
            <text:p text:style-name="P2">CURSO: 2022/2023</text:p>
            <text:p text:style-name="P2">Ciclo Superior: 2ºA.S.I.R.</text:p>
            <text:p text:style-name="P2">Módulo: LM. JAVASCRIPT.</text:p>
            <text:p text:style-name="P2">2ª EVALUACIÓN.</text:p>
          </table:table-cell>
          <table:table-cell table:style-name="Tabla1.B1" office:value-type="string">
            <text:p text:style-name="P1">N º 5</text:p>
          </table:table-cell>
        </table:table-row>
      </table:table>
      <text:p text:style-name="Standard"/>
      <text:p text:style-name="P11">1.-) Dado un array tab1, pasar a otro array tab2 todos los valores de tab1 pero en orden inverso, es decir:<text:line-break/>$tab1=array (2,44,5,6,7,8,9) —&gt; $tab2 queda con: 9,8,7,6,5,44,2</text:p>
      <text:p text:style-name="P8">Visualizar tab2.</text:p>
      <text:p text:style-name="P6"/>
      <text:p text:style-name="P8">2.-) Declarar un array o lista o vector BIDIMENSIONAL con valores numéricos. Visualizar los valores de cada fila o sublista. </text:p>
      <text:p text:style-name="P6"/>
      <text:p text:style-name="P10"><text:span text:style-name="T1"/></text:p>
      <text:p text:style-name="P10"><text:span text:style-name="T1">3.-) Dados tres arrays o listas, lista1, lista2 y lista3 con valores numéricos:</text:span></text:p>
      <text:p text:style-name="P10"><text:span text:style-name="T1"><text:s text:c="4"/>--&gt;guardar en el primer elemento de un <text:s/>array o lista BIDIMENSIONAL mat el primer array o lista. </text:span></text:p>
      <text:p text:style-name="P10"><text:span text:style-name="T1"><text:s text:c="4"/>--&gt;guardar en el segundo elemento de un <text:s/>array o lista BIDIMENSIONAL mat el segundo array o lista.</text:span></text:p>
      <text:p text:style-name="P10"><text:span text:style-name="T1"><text:s text:c="5"/>--&gt;guardar en el tercer elemento de un <text:s/>array o lista BIDIMENSIONAL mat el tercer array o lista</text:span></text:p>
      <text:p text:style-name="P10"><text:span text:style-name="T1"><text:s text:c="5"/>--&gt; Visualizar el array o lista BIDIMENSIONAL</text:span></text:p>
      <text:p text:style-name="P6"/>
      <text:p text:style-name="P10"><text:span text:style-name="T1"/></text:p>
      <text:p text:style-name="P8"><text:s/>4.-) <text:s/>Se declara un objeto con los contagios que ha habido en distintas localidades:</text:p>
      <text:p text:style-name="P8"><text:s/>“Chiclana” : 130, “Conil” : 220, “San Fernando” : 300</text:p>
      <text:p text:style-name="P8"><text:s/>Visualizar los valores de contagios.</text:p>
      <text:p text:style-name="P11"/>
      <text:p text:style-name="P6"/>
      <text:p text:style-name="P8"><text:span text:style-name="T1"/></text:p>
      <text:p text:style-name="P4">5.-) Declarar un objeto con los siguientes datos de un alumno: nombre, nota 1eval, nota 2eval y nota 3eval.</text:p>
      <text:p text:style-name="P4">Visualizar la media de sus tres notas.</text:p>
      <text:p text:style-name="P6"/>
      <text:p text:style-name="P8"><text:span text:style-name="T1"/></text:p>
      <text:p text:style-name="P11"><text:soft-page-break/>6.-) Declarar un array o lista unidimensional como: tab_numeros =array(3, 6, 4, 8, 2, 1, 9). Visualizar si o no son todos positivos (utilizar switch o flag).</text:p>
      <text:p text:style-name="P11"/>
      <text:p text:style-name="P6"/>
      <text:p text:style-name="P8"><text:span text:style-name="T1"/></text:p>
      <text:p text:style-name="P11"/>
      <text:p text:style-name="P4">7.-) Declarar un objeto con los precios de varios productos, <text:s/>por ejemplo: </text:p>
      <text:p text:style-name="P4"><text:s text:c="4"/>“disco_duro”:95 euros, “ordenador”:600 euros, “monitor”: 250 euros</text:p>
      <text:p text:style-name="P4">Visualizar los productos con precios mayores de 100 euros.</text:p>
      <text:p text:style-name="P6"/>
      <text:p text:style-name="P8"><text:span text:style-name="T1"/></text:p>
      <text:p text:style-name="P8">8.-) Declarar un array o lista unidimensional como por ejemplo: </text:p>
      <text:p text:style-name="P8"><text:s text:c="3"/>tab_numeros =(3, -6, 4, -8, 2, 1, 9). Pasar a otro solo los negativos. Visualizar el segundo.</text:p>
      <text:p text:style-name="P6"/>
      <text:p text:style-name="P8"><text:span text:style-name="T1"/></text:p>
      <text:p text:style-name="P5">9.-) <text:s/>Declarar un array o lista unidimensional como: tab_numeros =(3, 6, 4, 8, 2, 1, 9). Pasar los valores pares a un array1 o lista1 y los valores impares a otro array2 o lista2. Visualizar ambos arrays o listas.</text:p>
      <text:p text:style-name="P6"/>
      <text:p text:style-name="P8"><text:span text:style-name="T1"/></text:p>
      <text:p text:style-name="P3">10-) Se declara un array1 con los valores numéricos <text:s/>y el tamaño que quiera. Se declara un array2 con valores numéricos pero con el mismo tamaño que el anterior. Se pide <text:line-break/> <text:s text:c="2"/>a) Cuantos valores están repetidos en ambos arrays o <text:s/>listas en el mismo orden.<text:line-break/> <text:s/>b) <text:s/>Guardar los valores anteriores en un array2. Visualizar el array2.</text:p>
      <text:p text:style-name="P12"><text:s text:c="20"/>array1 = (3, 6, 7, 8, 9, 33)<text:line-break/> <text:s text:c="19"/>array2 = (3, 4, 7, 3, 9, 33) </text:p>
      <text:p text:style-name="P9"> Respuesta: 4 valores, es decir los valores 3, 7, 9 y 33.</text:p>
      <text:p text:style-name="P6"/>
      <text:p text:style-name="P8"><text:span text:style-name="T1"/></text:p>
      <text:p text:style-name="P5">11.-) <text:span text:style-name="T2">Se declaran dos arrays, visualizar SI o NO ambos son exactamente iguales, es decir, el primero de uno es igual al primero del otro, el segundo de uno al segundo del otro, y así sucesivamente. </text:span></text:p>
      <text:p text:style-name="P6"/>
      <text:p text:style-name="P8"><text:soft-page-break/><text:span text:style-name="T1"/></text:p>
      <text:p text:style-name="P5"><text:span text:style-name="T2">12.-) </text:span><text:s/>Se declara un objeto con los contagios que ha habido en distintas localidades:</text:p>
      <text:p text:style-name="P8"><text:s/>“Chiclana” : 130, “Conil” : 220, “San Fernando” : 300</text:p>
      <text:p text:style-name="P5"><text:span text:style-name="T2"><text:s/>Obtener la suma de los contagios de las tres ciudades (130+220+300)</text:span></text:p>
      <text:p text:style-name="P6"/>
      <text:p text:style-name="P8"><text:span text:style-name="T1"/></text:p>
      <text:p text:style-name="P5"><text:span text:style-name="T2">13.-) Declarar una lista o arrays bidimensional, con varias sublistas que contenga valores numéricos enteros. Visualizar la suma de los valores de cada sublista, por ejemplo:</text:span></text:p>
      <text:p text:style-name="P5"><text:span text:style-name="T2"><text:tab/><text:tab/>lista : (1,1,2,3,4), (2,2,2),(3,3,3),(4,4,4)</text:span></text:p>
      <text:p text:style-name="P5"><text:span text:style-name="T2">La solución es: 11 (primera sublista), 6 (segunda sublista) , 9 y 12</text:span></text:p>
      <text:p text:style-name="P6"/>
      <text:p text:style-name="P8"><text:span text:style-name="T1"/></text:p>
      <text:p text:style-name="P5"><text:span text:style-name="T2">14.-) </text:span>Declarar un array o lista unidimensional como por ejemplo: </text:p>
      <text:p text:style-name="P5"><text:span text:style-name="T2"><text:s text:c="3"/>tab_numeros =(3, -6, 0, -8, 0, 1, 9). Se pide: cuantos ceros hay en el array o lista.</text:span></text:p>
      <text:p text:style-name="P9"/>
      <text:p text:style-name="P6"/>
      <text:p text:style-name="P8">15.-) <text:span text:style-name="T2"><text:s/>Declarar una lista o arrays bidimensional, con varias sublistas que contenga valores numéricos enteros, por ejemplo:</text:span></text:p>
      <text:p text:style-name="P8"><text:span text:style-name="T2"><text:tab/><text:tab/>lista : (1,1,2,3,4), (2,2,2),(3,3,3),(4,4,4)</text:span></text:p>
      <text:p text:style-name="P8"><text:span text:style-name="T2"/></text:p>
      <text:p text:style-name="P8"><text:span text:style-name="T2">Visualizar el primero y último de cada sublista.</text:span></text:p>
      <text:p text:style-name="P7"><text:span text:style-name="T1"/></text:p>
      <text:p text:style-name="P8"><text:span text:style-name="T2">16.-) </text:span>Declarar un array o lista unidimensional con varios nombres. Dado un nombre en un formulario, visualizar SI o NO está ese nombre en el array o lista.</text:p>
      <text:p text:style-name="P6"/>
      <text:p text:style-name="P8"><text:span text:style-name="T1"/></text:p>
      <text:p text:style-name="P8">17.-) (repaso) Dados dos valores numéricos, obtener la suma de los valores pares incluidos entre ellos.</text:p>
      <text:p text:style-name="P6"/>
      <text:p text:style-name="P8">18.-) (repaso) Dado un número, obtener la suma de los valores de los valores inferiores hasta el 1. por ejemplo, para el valor 7, sería: 6+5+4+3+2+1 = 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-asian="Times New Roman1" style:font-name-complex="Times New Roman1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orphans="2" fo:widows="2"/>
      <style:text-properties style:letter-kerning="true" style:font-name-asian="Times New Roman1" style:font-name-complex="Times New Roman1" style:language-complex="ar" style:country-complex="SA"/>
    </style:style>
    <style:style style:name="List" style:family="paragraph" style:parent-style-name="Text_20_body" style:default-outline-level="" style:list-style-name="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Descripción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Mangal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11" style:display-name="Título 11" style:family="paragraph" style:parent-style-name="Heading" style:default-outline-level="1">
      <style:text-properties fo:font-weight="bold" style:font-weight-asian="bold" style:font-weight-complex="bold"/>
    </style:style>
    <style:style style:name="Título_20_21" style:display-name="Título 21" style:family="paragraph" style:parent-style-name="Heading" style:default-outline-level="2">
      <style:text-properties fo:font-style="italic" fo:font-weight="bold" style:font-style-asian="italic" style:font-weight-asian="bold" style:font-style-complex="italic" style:font-weight-complex="bold"/>
    </style:style>
    <style:style style:name="Título_20_31" style:display-name="Título 31" style:family="paragraph" style:parent-style-name="Heading" style:default-outline-level="3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orphans="2" fo:widows="2" fo:hyphenation-ladder-count="no-limit"/>
      <style:text-properties style:letter-kerning="true" style:font-name-asian="Times New Roman1" style:language-asian="es" style:country-asian="ES" style:font-name-complex="Times New Roman1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 fo:orphans="2" fo:widows="2"/>
      <style:text-properties style:font-name="Courier New" fo:font-size="10pt" style:letter-kerning="true" style:font-name-asian="NSimSun" style:font-size-asian="10pt" style:language-asian="ar" style:country-asian="SA" style:font-name-complex="Courier New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 style:list-style-name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style:letter-kerning="true" style:font-name-asian="Times New Roman1" style:font-size-asian="10pt" style:language-asian="es" style:country-asian="ES" style:font-name-complex="Courier New2" style:font-size-complex="10pt" style:language-complex="ar" style:country-complex="SA" fo:hyphenate="tru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Times New Roman" style:font-name-asian="Times New Roman1" style:font-name-complex="Times New Roman1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style:font-name-asian="Times New Roman1" style:font-name-complex="Times New Roman1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style:font-name-asian="Times New Roman1" style:font-name-complex="Times New Roman1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WW8Num8z1" style:family="text">
      <style:text-properties style:font-name="Courier New1" style:font-name-complex="Courier New2"/>
    </style:style>
    <style:style style:name="WW8Num8z2" style:family="text">
      <style:text-properties style:font-name="Wingdings" style:font-name-complex="Wingdings1"/>
    </style:style>
    <style:style style:name="WW8Num8z3" style:family="text">
      <style:text-properties style:font-name="Symbol" style:font-name-complex="Symbol1"/>
    </style:style>
    <style:style style:name="Texto_20_independiente_20_Car" style:display-name="Texto independiente Car" style:family="text" style:parent-style-name="Default_20_Paragraph_20_Font">
      <style:text-properties style:letter-kerning="true" style:font-name-asian="Times New Roman1" style:font-name-complex="Times New Roman1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size="10pt" style:letter-kerning="true" style:font-name-asian="Times New Roman1" style:font-size-asian="10pt" style:language-asian="es" style:country-asian="ES" style:font-name-complex="Courier New2" style:font-size-complex="10pt" style:language-complex="ar" style:country-complex="SA"/>
    </style:style>
    <style:style style:name="simbol" style:family="text" style:parent-style-name="Default_20_Paragraph_20_Font"/>
    <style:style style:name="brackets" style:family="text" style:parent-style-name="Default_20_Paragraph_20_Font"/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fo:font-size="16pt" style:font-name-asian="Times New Roman1" style:font-size-asian="16pt" style:font-name-complex="Times New Roman1" style:font-size-complex="16pt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Wingdings1"/>
    </style:style>
    <style:style style:name="ListLabel_20_5" style:display-name="ListLabel 5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8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STITUTO DE E</dc:title>
    <meta:initial-creator>Alberto</meta:initial-creator>
    <dc:creator>Alberto M</dc:creator>
    <meta:editing-cycles>17</meta:editing-cycles>
    <meta:creation-date>2021-10-27T08:26:00</meta:creation-date>
    <dc:date>2023-02-15T20:53:44</dc:date>
    <meta:editing-duration>PT4H18M30S</meta:editing-duration>
    <meta:generator>OpenOffice/4.1.7$Unix OpenOffice.org_project/417m1$Build-9800</meta:generator>
    <meta:document-statistic meta:table-count="1" meta:image-count="0" meta:object-count="0" meta:page-count="3" meta:paragraph-count="44" meta:word-count="651" meta:character-count="388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